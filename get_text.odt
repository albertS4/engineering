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text-indent="0cm" style:auto-text-indent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style:font-name="Times New Roman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Heading_20_2">
      <style:paragraph-properties fo:margin-top="0cm" fo:margin-bottom="0.247cm" style:contextual-spacing="false" fo:line-height="115%"/>
      <style:text-properties style:font-name="Times New Roman"/>
    </style:style>
    <style:style style:name="P9" style:family="paragraph" style:parent-style-name="Heading_20_3">
      <style:paragraph-properties fo:margin-top="0cm" fo:margin-bottom="0.247cm" style:contextual-spacing="false" fo:line-height="115%"/>
      <style:text-properties style:font-name="Times New Roman"/>
    </style:style>
    <style:style style:name="P10" style:family="paragraph" style:parent-style-name="Heading_20_1">
      <style:text-properties style:font-name="Times New Roman" fo:font-size="14pt"/>
    </style:style>
    <style:style style:name="P11" style:family="paragraph" style:parent-style-name="Heading_20_2">
      <style:paragraph-properties fo:margin-top="0cm" fo:margin-bottom="0.247cm" style:contextual-spacing="false" fo:line-height="115%"/>
      <style:text-properties style:font-name="Times New Roman" fo:font-size="14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Times New Roman"/>
    </style:style>
    <style:style style:name="P13" style:family="paragraph" style:parent-style-name="Text_20_body" style:list-style-name="L1">
      <style:text-properties style:font-name="Times New Roman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Times New Roman"/>
    </style:style>
    <style:style style:name="P15" style:family="paragraph" style:parent-style-name="Text_20_body" style:list-style-name="L2">
      <style:text-properties style:font-name="Times New Roman"/>
    </style:style>
    <style:style style:name="P16" style:family="paragraph" style:parent-style-name="Heading_20_1">
      <style:paragraph-properties fo:margin-top="0cm" fo:margin-bottom="0.247cm" style:contextual-spacing="false" fo:line-height="115%"/>
      <style:text-properties style:font-name="Times New Roman" fo:font-size="14pt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style:font-name="Times New Roman"/>
    </style:style>
    <style:style style:name="P18" style:family="paragraph" style:parent-style-name="Text_20_body" style:list-style-name="L3">
      <style:text-properties style:font-name="Times New Roman"/>
    </style:style>
    <style:style style:name="P19" style:family="paragraph" style:parent-style-name="Text_20_body" style:list-style-name="L4">
      <style:paragraph-properties fo:margin-top="0cm" fo:margin-bottom="0cm" style:contextual-spacing="false"/>
      <style:text-properties style:font-name="Times New Roman"/>
    </style:style>
    <style:style style:name="P20" style:family="paragraph" style:parent-style-name="Text_20_body" style:list-style-name="L4">
      <style:text-properties style:font-name="Times New Roman"/>
    </style:style>
    <style:style style:name="P21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22" style:family="paragraph" style:parent-style-name="Text_20_body" style:list-style-name="L5">
      <style:text-properties style:font-name="Times New Roman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style:font-name="Times New Roman"/>
    </style:style>
    <style:style style:name="P24" style:family="paragraph" style:parent-style-name="Text_20_body" style:list-style-name="L6">
      <style:text-properties style:font-name="Times New Roma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"><text:a xlink:type="simple" xlink:href="#__RefHeading___Toc11_937824442" text:style-name="Index_20_Link" text:visited-style-name="Index_20_Link">1 Основные направления деятельности<text:tab/>2</text:a></text:p>
          <text:p text:style-name="P2"><text:a xlink:type="simple" xlink:href="#__RefHeading___Toc13_937824442" text:style-name="Index_20_Link" text:visited-style-name="Index_20_Link">1.1 Экспериментальные исследования<text:tab/>2</text:a></text:p>
          <text:p text:style-name="P3"><text:a xlink:type="simple" xlink:href="#__RefHeading___Toc15_937824442" text:style-name="Index_20_Link" text:visited-style-name="Index_20_Link">1.1.1 Разработка и проведение экспериментов<text:tab/>2</text:a></text:p>
          <text:p text:style-name="P3"><text:a xlink:type="simple" xlink:href="#__RefHeading___Toc17_937824442" text:style-name="Index_20_Link" text:visited-style-name="Index_20_Link">1.1.2 Сбор данных<text:tab/>2</text:a></text:p>
          <text:p text:style-name="P2"><text:a xlink:type="simple" xlink:href="#__RefHeading___Toc19_937824442" text:style-name="Index_20_Link" text:visited-style-name="Index_20_Link">1.2 Анализ данных<text:tab/>2</text:a></text:p>
          <text:p text:style-name="P3"><text:a xlink:type="simple" xlink:href="#__RefHeading___Toc21_937824442" text:style-name="Index_20_Link" text:visited-style-name="Index_20_Link">1.2.1 Обработка и интерпретация полученных данных<text:tab/>2</text:a></text:p>
          <text:p text:style-name="P3"><text:a xlink:type="simple" xlink:href="#__RefHeading___Toc23_937824442" text:style-name="Index_20_Link" text:visited-style-name="Index_20_Link">1.2.2 Применение методов моделирования и симуляции<text:tab/>2</text:a></text:p>
          <text:p text:style-name="P2"><text:a xlink:type="simple" xlink:href="#__RefHeading___Toc25_937824442" text:style-name="Index_20_Link" text:visited-style-name="Index_20_Link">1.3 Разработка и тестирование прототипов<text:tab/>3</text:a></text:p>
          <text:p text:style-name="P3"><text:a xlink:type="simple" xlink:href="#__RefHeading___Toc27_937824442" text:style-name="Index_20_Link" text:visited-style-name="Index_20_Link">1.3.1 Создание прототипов<text:tab/>3</text:a></text:p>
          <text:p text:style-name="P3"><text:a xlink:type="simple" xlink:href="#__RefHeading___Toc29_937824442" text:style-name="Index_20_Link" text:visited-style-name="Index_20_Link">1.3.2 Тестирование прототипов<text:tab/>3</text:a></text:p>
          <text:p text:style-name="P3"><text:a xlink:type="simple" xlink:href="#__RefHeading___Toc31_937824442" text:style-name="Index_20_Link" text:visited-style-name="Index_20_Link">1.3.3 Подготовка отчётов и презентаций<text:tab/>3</text:a></text:p>
          <text:p text:style-name="P3"><text:a xlink:type="simple" xlink:href="#__RefHeading___Toc33_937824442" text:style-name="Index_20_Link" text:visited-style-name="Index_20_Link">1.3.4 Оформление результатов исследований<text:tab/>3</text:a></text:p>
          <text:p text:style-name="P3"><text:a xlink:type="simple" xlink:href="#__RefHeading___Toc35_937824442" text:style-name="Index_20_Link" text:visited-style-name="Index_20_Link">1.3.5 Публикация результатов<text:tab/>3</text:a></text:p>
          <text:p text:style-name="P2"><text:a xlink:type="simple" xlink:href="#__RefHeading___Toc37_937824442" text:style-name="Index_20_Link" text:visited-style-name="Index_20_Link">1.4 Сотрудничество<text:tab/>3</text:a></text:p>
          <text:p text:style-name="P3"><text:a xlink:type="simple" xlink:href="#__RefHeading___Toc39_937824442" text:style-name="Index_20_Link" text:visited-style-name="Index_20_Link">1.4.1 Работа в команде<text:tab/>3</text:a></text:p>
          <text:p text:style-name="P3"><text:a xlink:type="simple" xlink:href="#__RefHeading___Toc41_937824442" text:style-name="Index_20_Link" text:visited-style-name="Index_20_Link">1.4.2 Участие в междисциплинарных проектах<text:tab/>3</text:a></text:p>
          <text:p text:style-name="P1"><text:a xlink:type="simple" xlink:href="#__RefHeading___Toc179_937824442" text:style-name="Index_20_Link" text:visited-style-name="Index_20_Link">2 Ключевые компетенции специалиста<text:tab/>4</text:a></text:p>
          <text:p text:style-name="P2"><text:a xlink:type="simple" xlink:href="#__RefHeading___Toc181_937824442" text:style-name="Index_20_Link" text:visited-style-name="Index_20_Link">2.1 Технические навыки<text:tab/>4</text:a></text:p>
          <text:p text:style-name="P2"><text:a xlink:type="simple" xlink:href="#__RefHeading___Toc183_937824442" text:style-name="Index_20_Link" text:visited-style-name="Index_20_Link">Личностные качества<text:tab/>4</text:a></text:p>
          <text:p text:style-name="P1"><text:a xlink:type="simple" xlink:href="#__RefHeading___Toc185_937824442" text:style-name="Index_20_Link" text:visited-style-name="Index_20_Link">Сферы применения<text:tab/>4</text:a></text:p>
          <text:p text:style-name="P2"><text:a xlink:type="simple" xlink:href="#__RefHeading___Toc187_937824442" text:style-name="Index_20_Link" text:visited-style-name="Index_20_Link">Роль в современном бизнесе<text:tab/>4</text:a></text:p>
          <text:p text:style-name="P2"><text:a xlink:type="simple" xlink:href="#__RefHeading___Toc189_937824442" text:style-name="Index_20_Link" text:visited-style-name="Index_20_Link">Перспективы развития<text:tab/>4</text:a></text:p>
          <text:p text:style-name="P1"><text:a xlink:type="simple" xlink:href="#__RefHeading___Toc191_937824442" text:style-name="Index_20_Link" text:visited-style-name="Index_20_Link">Требования к образованию<text:tab/>5</text:a></text:p>
          <text:p text:style-name="P1"><text:a xlink:type="simple" xlink:href="#__RefHeading___Toc193_937824442" text:style-name="Index_20_Link" text:visited-style-name="Index_20_Link">Заключение<text:tab/>5</text:a></text:p>
        </text:index-body>
      </text:table-of-content>
      <text:p text:style-name="P4"/>
      <text:h text:style-name="P5" text:outline-level="1">Введение</text:h>
      <text:h text:style-name="P6" text:outline-level="1"><text:bookmark-start text:name="__RefHeading___Toc11_937824442"/>Основные направления деятельности<text:bookmark-end text:name="__RefHeading___Toc11_937824442"/></text:h>
      <text:p text:style-name="P7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P8" text:outline-level="2"><text:bookmark-start text:name="__RefHeading___Toc13_937824442"/>Экспериментальные исследования<text:bookmark-end text:name="__RefHeading___Toc13_937824442"/></text:h>
      <text:h text:style-name="P9" text:outline-level="3"><text:bookmark-start text:name="__RefHeading___Toc15_937824442"/>Разработка и проведение экспериментов<text:bookmark-end text:name="__RefHeading___Toc15_937824442"/></text:h>
      <text:p text:style-name="P7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9" text:outline-level="3"><text:bookmark-start text:name="__RefHeading___Toc17_937824442"/>Сбор данных<text:bookmark-end text:name="__RefHeading___Toc17_937824442"/></text:h>
      <text:p text:style-name="P7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8" text:outline-level="2"><text:bookmark-start text:name="__RefHeading___Toc19_937824442"/>Анализ данных<text:bookmark-end text:name="__RefHeading___Toc19_937824442"/></text:h>
      <text:h text:style-name="P9" text:outline-level="3"><text:bookmark-start text:name="__RefHeading___Toc21_937824442"/>Обработка и интерпретация полученных данных<text:bookmark-end text:name="__RefHeading___Toc21_937824442"/></text:h>
      <text:p text:style-name="P7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9" text:outline-level="3"><text:bookmark-start text:name="__RefHeading___Toc23_937824442"/>Применение методов моделирования и симуляции<text:bookmark-end text:name="__RefHeading___Toc23_937824442"/></text:h>
      <text:p text:style-name="P7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8" text:outline-level="2"><text:bookmark-start text:name="__RefHeading___Toc25_937824442"/><text:soft-page-break/>Разработка и тестирование прототипов<text:bookmark-end text:name="__RefHeading___Toc25_937824442"/></text:h>
      <text:h text:style-name="P9" text:outline-level="3"><text:bookmark-start text:name="__RefHeading___Toc27_937824442"/>Создание прототипов<text:bookmark-end text:name="__RefHeading___Toc27_937824442"/></text:h>
      <text:p text:style-name="P7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P9" text:outline-level="3"><text:bookmark-start text:name="__RefHeading___Toc29_937824442"/>Тестирование прототипов<text:bookmark-end text:name="__RefHeading___Toc29_937824442"/></text:h>
      <text:p text:style-name="P7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P9" text:outline-level="3"><text:bookmark-start text:name="__RefHeading___Toc31_937824442"/>Подготовка отчётов и презентаций<text:bookmark-end text:name="__RefHeading___Toc31_937824442"/></text:h>
      <text:h text:style-name="P9" text:outline-level="3"><text:bookmark-start text:name="__RefHeading___Toc33_937824442"/>Оформление результатов исследований<text:bookmark-end text:name="__RefHeading___Toc33_937824442"/></text:h>
      <text:p text:style-name="P7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P9" text:outline-level="3"><text:bookmark-start text:name="__RefHeading___Toc35_937824442"/>Публикация результатов<text:bookmark-end text:name="__RefHeading___Toc35_937824442"/></text:h>
      <text:p text:style-name="P7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8" text:outline-level="2"><text:bookmark-start text:name="__RefHeading___Toc37_937824442"/>Сотрудничество<text:bookmark-end text:name="__RefHeading___Toc37_937824442"/></text:h>
      <text:h text:style-name="P9" text:outline-level="3"><text:bookmark-start text:name="__RefHeading___Toc39_937824442"/>Работа в команде<text:bookmark-end text:name="__RefHeading___Toc39_937824442"/></text:h>
      <text:p text:style-name="P7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9" text:outline-level="3"><text:bookmark-start text:name="__RefHeading___Toc41_937824442"/>Участие в междисциплинарных проектах<text:bookmark-end text:name="__RefHeading___Toc41_937824442"/></text:h>
      <text:p text:style-name="P7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0" text:outline-level="1"><text:bookmark-start text:name="__RefHeading___Toc179_937824442"/><text:soft-page-break/>Ключевые компетенции специалиста<text:bookmark-end text:name="__RefHeading___Toc179_937824442"/></text:h>
      <text:h text:style-name="P11" text:outline-level="2"><text:bookmark-start text:name="__RefHeading___Toc181_937824442"/>Технические навыки<text:bookmark-end text:name="__RefHeading___Toc181_937824442"/></text:h>
      <text:list text:style-name="L1">
        <text:list-item>
          <text:p text:style-name="P12">Глубокие знания в профильной области </text:p>
        </text:list-item>
        <text:list-item>
          <text:p text:style-name="P12">Умение работать с современным оборудованием </text:p>
        </text:list-item>
        <text:list-item>
          <text:p text:style-name="P12">Навыки программирования </text:p>
        </text:list-item>
        <text:list-item>
          <text:p text:style-name="P13">Способность к математическому моделированию </text:p>
        </text:list-item>
      </text:list>
      <text:h text:style-name="P11" text:outline-level="2" text:is-list-header="true"><text:bookmark-start text:name="__RefHeading___Toc183_937824442"/>Личностные качества<text:bookmark-end text:name="__RefHeading___Toc183_937824442"/></text:h>
      <text:list text:style-name="L2">
        <text:list-item>
          <text:p text:style-name="P14">Аналитическое мышление </text:p>
        </text:list-item>
        <text:list-item>
          <text:p text:style-name="P14">Способность к критическому анализу </text:p>
        </text:list-item>
        <text:list-item>
          <text:p text:style-name="P14">Гибкость мышления </text:p>
        </text:list-item>
        <text:list-item>
          <text:p text:style-name="P14">Коммуникабельность </text:p>
        </text:list-item>
        <text:list-item>
          <text:p text:style-name="P15">Стремление к постоянному обучению </text:p>
        </text:list-item>
      </text:list>
      <text:h text:style-name="P16" text:outline-level="1" text:is-list-header="true"><text:bookmark-start text:name="__RefHeading___Toc185_937824442"/>Сферы применения<text:bookmark-end text:name="__RefHeading___Toc185_937824442"/></text:h>
      <text:p text:style-name="P7">Инженеры-исследователи востребованы в:</text:p>
      <text:list text:style-name="L3">
        <text:list-item>
          <text:p text:style-name="P17">Машиностроении </text:p>
        </text:list-item>
        <text:list-item>
          <text:p text:style-name="P17">Электронике </text:p>
        </text:list-item>
        <text:list-item>
          <text:p text:style-name="P17">Энергетике </text:p>
        </text:list-item>
        <text:list-item>
          <text:p text:style-name="P17">Биотехнологиях </text:p>
        </text:list-item>
        <text:list-item>
          <text:p text:style-name="P17">IT-индустрии </text:p>
        </text:list-item>
        <text:list-item>
          <text:p text:style-name="P18">Химической промышленности </text:p>
        </text:list-item>
      </text:list>
      <text:h text:style-name="P11" text:outline-level="2" text:is-list-header="true"><text:bookmark-start text:name="__RefHeading___Toc187_937824442"/>Роль в современном бизнесе<text:bookmark-end text:name="__RefHeading___Toc187_937824442"/></text:h>
      <text:p text:style-name="P7">Преимущества для компании:</text:p>
      <text:list text:style-name="L4">
        <text:list-item>
          <text:p text:style-name="P19">Внедрение передовых технологий </text:p>
        </text:list-item>
        <text:list-item>
          <text:p text:style-name="P19">Оптимизация производственных процессов </text:p>
        </text:list-item>
        <text:list-item>
          <text:p text:style-name="P19">Разработка инновационных продуктов </text:p>
        </text:list-item>
        <text:list-item>
          <text:p text:style-name="P19">Снижение затрат </text:p>
        </text:list-item>
        <text:list-item>
          <text:p text:style-name="P20">Повышение конкурентоспособности </text:p>
        </text:list-item>
      </text:list>
      <text:h text:style-name="P11" text:outline-level="2" text:is-list-header="true"><text:bookmark-start text:name="__RefHeading___Toc189_937824442"/>Перспективы развития<text:bookmark-end text:name="__RefHeading___Toc189_937824442"/></text:h>
      <text:p text:style-name="P7">Карьерный рост инженера-исследователя может включать:</text:p>
      <text:list text:style-name="L5">
        <text:list-item>
          <text:p text:style-name="P21">Руководящие позиции в отделах исследований и разработок </text:p>
        </text:list-item>
        <text:list-item>
          <text:p text:style-name="P21">Создание собственных исследовательских проектов </text:p>
        </text:list-item>
        <text:list-item>
          <text:p text:style-name="P21">Переход в академическую сферу </text:p>
        </text:list-item>
        <text:list-item>
          <text:p text:style-name="P22"><text:soft-page-break/>Основание инновационных компаний </text:p>
        </text:list-item>
      </text:list>
      <text:h text:style-name="P16" text:outline-level="1" text:is-list-header="true"><text:bookmark-start text:name="__RefHeading___Toc191_937824442"/>Требования к образованию<text:bookmark-end text:name="__RefHeading___Toc191_937824442"/></text:h>
      <text:p text:style-name="P7">Для работы инженером-исследователем необходимо:</text:p>
      <text:list text:style-name="L6">
        <text:list-item>
          <text:p text:style-name="P23">Высшее техническое образование </text:p>
        </text:list-item>
        <text:list-item>
          <text:p text:style-name="P23">Магистратура или аспирантура </text:p>
        </text:list-item>
        <text:list-item>
          <text:p text:style-name="P23">Практический опыт в выбранной области </text:p>
        </text:list-item>
        <text:list-item>
          <text:p text:style-name="P23">Знание современных методов исследования </text:p>
        </text:list-item>
        <text:list-item>
          <text:p text:style-name="P24">Владение специализированным программным обеспечением </text:p>
        </text:list-item>
      </text:list>
      <text:h text:style-name="P16" text:outline-level="1" text:is-list-header="true"><text:bookmark-start text:name="__RefHeading___Toc193_937824442"/>Заключение<text:bookmark-end text:name="__RefHeading___Toc193_937824442"/></text:h>
      <text:p text:style-name="P7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line-height="150%" fo:text-align="justify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normal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5:55:29.876504700</meta:creation-date>
    <meta:generator>LibreOffice/25.2.7.2$Windows_X86_64 LibreOffice_project/5cbfd1ab6520636bb5f7b99185aa69bd7456825d</meta:generator>
    <dc:date>2026-04-13T16:37:09.019486700</dc:date>
    <meta:editing-duration>PT19M3S</meta:editing-duration>
    <meta:editing-cycles>4</meta:editing-cycles>
    <meta:document-statistic meta:table-count="0" meta:image-count="0" meta:object-count="0" meta:page-count="5" meta:paragraph-count="96" meta:word-count="613" meta:character-count="4952" meta:non-whitespace-character-count="4454"/>
  </office:meta>
</office:document-meta>
</file>